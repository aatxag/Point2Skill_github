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italic" fo:font-weight="bold" officeooo:rsid="00101b3d" officeooo:paragraph-rsid="00101b3d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text-properties fo:font-size="15pt" fo:font-style="italic" fo:font-weight="bold" officeooo:rsid="0029c49b" officeooo:paragraph-rsid="0029c49b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text-properties fo:font-size="15pt" fo:font-style="italic" fo:font-weight="bold" officeooo:rsid="002b0905" officeooo:paragraph-rsid="002b0905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text-properties fo:font-size="15pt" fo:font-style="italic" fo:font-weight="bold" officeooo:rsid="00101b3d" officeooo:paragraph-rsid="00101b3d" fo:background-color="#dde8cb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text-properties fo:font-size="12pt" fo:font-style="normal" fo:font-weight="normal" officeooo:rsid="00101b3d" officeooo:paragraph-rsid="00101b3d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fo:font-weight="normal" officeooo:rsid="00101b3d" officeooo:paragraph-rsid="00123ccc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fo:font-weight="normal" officeooo:rsid="00127ad6" officeooo:paragraph-rsid="0016503c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fo:font-weight="normal" officeooo:rsid="00127ad6" officeooo:paragraph-rsid="001b11d5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fo:font-weight="normal" officeooo:rsid="00127ad6" officeooo:paragraph-rsid="002b0905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fo:font-weight="normal" officeooo:rsid="00101b3d" officeooo:paragraph-rsid="00101b3d" fo:background-color="#dde8cb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fo:font-weight="normal" officeooo:rsid="00101b3d" officeooo:paragraph-rsid="002e3d2d" fo:background-color="#dde8c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fo:font-weight="normal" officeooo:rsid="00127ad6" officeooo:paragraph-rsid="001f1ec2" fo:background-color="#dde8cb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normal" fo:font-weight="normal" officeooo:rsid="00127ad6" officeooo:paragraph-rsid="00234460" fo:background-color="#dde8cb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fo:font-weight="normal" officeooo:rsid="00127ad6" officeooo:paragraph-rsid="00266e87" fo:background-color="#dde8cb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fo:font-weight="normal" officeooo:rsid="00127ad6" officeooo:paragraph-rsid="002b0905" fo:background-color="#dde8cb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fo:font-weight="normal" officeooo:rsid="00127ad6" officeooo:paragraph-rsid="0018562e" fo:background-color="#dee6ef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fo:font-weight="normal" officeooo:rsid="00101b3d" officeooo:paragraph-rsid="001d039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fo:font-weight="normal" officeooo:rsid="002807c9" officeooo:paragraph-rsid="002807c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2pt" fo:font-style="normal" fo:font-weight="normal" officeooo:rsid="001a68a8" officeooo:paragraph-rsid="001a68a8" fo:background-color="#dedce6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font-style="normal" fo:font-weight="normal" officeooo:rsid="00127ad6" officeooo:paragraph-rsid="001b11d5" fo:background-color="#ffd8ce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fo:font-weight="normal" officeooo:rsid="002807c9" officeooo:paragraph-rsid="002807c9" fo:background-color="#ffd8ce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fo:font-weight="bold" officeooo:rsid="001a68a8" officeooo:paragraph-rsid="001a68a8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fo:font-size="12pt" fo:font-style="normal" fo:font-weight="bold" officeooo:rsid="001a68a8" officeooo:paragraph-rsid="001b11d5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fo:font-size="12pt" fo:font-style="normal" fo:font-weight="bold" officeooo:rsid="001a68a8" officeooo:paragraph-rsid="00234460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fo:font-size="12pt" fo:font-style="normal" fo:font-weight="bold" officeooo:rsid="001a68a8" officeooo:paragraph-rsid="00266e87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fo:font-size="12pt" fo:font-style="normal" fo:font-weight="bold" officeooo:rsid="001a68a8" officeooo:paragraph-rsid="002b0905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fo:font-size="12pt" fo:font-style="normal" fo:font-weight="bold" officeooo:rsid="001a68a8" officeooo:paragraph-rsid="001a68a8" fo:background-color="transparent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text-properties fo:font-size="12pt" fo:font-style="normal" fo:font-weight="bold" officeooo:rsid="002807c9" officeooo:paragraph-rsid="002807c9" fo:background-color="#ffd8ce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252069" officeooo:paragraph-rsid="00252069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text-properties fo:font-size="12pt" fo:font-weight="normal" officeooo:rsid="002f0966" officeooo:paragraph-rsid="001d039d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2f0966" officeooo:paragraph-rsid="001253aa" fo:background-color="#dde8cb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style="italic" fo:font-weight="bold" officeooo:rsid="001a68a8" officeooo:paragraph-rsid="001a68a8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Standard">
      <style:text-properties fo:font-size="12pt" fo:font-style="italic" fo:font-weight="bold" officeooo:rsid="001a68a8" officeooo:paragraph-rsid="002b0905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Standard">
      <style:text-properties fo:font-size="12pt" fo:font-style="italic" fo:font-weight="bold" officeooo:rsid="002b0905" officeooo:paragraph-rsid="002b0905" style:font-size-asian="12pt" style:font-style-asian="italic" style:font-weight-asian="bold" style:font-size-complex="12pt" style:font-style-complex="italic" style:font-weight-complex="bold"/>
    </style:style>
    <style:style style:name="P35" style:family="paragraph" style:parent-style-name="Standard">
      <style:text-properties fo:font-size="12pt" fo:font-style="italic" fo:font-weight="bold" officeooo:rsid="001a68a8" officeooo:paragraph-rsid="001a68a8" fo:background-color="#dee6ef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Standard">
      <style:text-properties fo:color="#bf0041" loext:opacity="100%" fo:font-size="12pt" fo:font-style="normal" fo:font-weight="bold" officeooo:rsid="0020abee" officeooo:paragraph-rsid="0020abee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text-properties fo:font-size="10pt" fo:font-style="normal" fo:font-weight="normal" officeooo:rsid="00101b3d" officeooo:paragraph-rsid="00101b3d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text-properties fo:font-size="10pt" fo:font-style="normal" fo:font-weight="normal" officeooo:rsid="00101b3d" officeooo:paragraph-rsid="00101b3d" fo:background-color="#dde8cb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11b4e9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8562e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officeooo:rsid="002b0905" fo:background-color="transparent" loext:char-shading-value="0" style:font-style-asian="italic" style:font-style-complex="italic"/>
    </style:style>
    <style:style style:name="T5" style:family="text">
      <style:text-properties fo:font-style="italic" style:text-underline-style="none" fo:background-color="transparent" loext:char-shading-value="0" style:font-style-asian="italic" style:font-style-complex="italic"/>
    </style:style>
    <style:style style:name="T6" style:family="text">
      <style:text-properties officeooo:rsid="001253aa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background-color="transparent" loext:char-shading-value="0"/>
    </style:style>
    <style:style style:name="T9" style:family="text">
      <style:text-properties style:text-underline-style="none" fo:background-color="transparent" loext:char-shading-value="0"/>
    </style:style>
    <style:style style:name="T10" style:family="text">
      <style:text-properties style:text-underline-style="none" officeooo:rsid="0016503c" fo:background-color="transparent" loext:char-shading-value="0"/>
    </style:style>
    <style:style style:name="T11" style:family="text">
      <style:text-properties style:text-underline-style="none" officeooo:rsid="0016503c" fo:background-color="transparent" loext:char-shading-value="0"/>
    </style:style>
    <style:style style:name="T12" style:family="text">
      <style:text-properties style:text-underline-style="none" officeooo:rsid="001a68a8" fo:background-color="transparent" loext:char-shading-value="0"/>
    </style:style>
    <style:style style:name="T13" style:family="text">
      <style:text-properties style:text-underline-style="none" officeooo:rsid="001b11d5" fo:background-color="transparent" loext:char-shading-value="0"/>
    </style:style>
    <style:style style:name="T14" style:family="text">
      <style:text-properties style:text-underline-style="none" officeooo:rsid="001b11d5" fo:background-color="transparent" loext:char-shading-value="0"/>
    </style:style>
    <style:style style:name="T15" style:family="text">
      <style:text-properties style:text-underline-style="none" officeooo:rsid="00234460" fo:background-color="transparent" loext:char-shading-value="0"/>
    </style:style>
    <style:style style:name="T16" style:family="text">
      <style:text-properties style:text-underline-style="none" officeooo:rsid="00234460" fo:background-color="transparent" loext:char-shading-value="0"/>
    </style:style>
    <style:style style:name="T17" style:family="text">
      <style:text-properties style:text-underline-style="none" officeooo:rsid="00266e87" fo:background-color="transparent" loext:char-shading-value="0"/>
    </style:style>
    <style:style style:name="T18" style:family="text">
      <style:text-properties style:text-underline-style="none" officeooo:rsid="00266e87" fo:background-color="transparent" loext:char-shading-value="0"/>
    </style:style>
    <style:style style:name="T19" style:family="text">
      <style:text-properties style:text-underline-style="none" officeooo:rsid="002b0905" fo:background-color="transparent" loext:char-shading-value="0"/>
    </style:style>
    <style:style style:name="T20" style:family="text">
      <style:text-properties style:text-underline-style="none" officeooo:rsid="00127ad6" fo:background-color="transparent" loext:char-shading-value="0"/>
    </style:style>
    <style:style style:name="T21" style:family="text">
      <style:text-properties style:text-underline-style="none" officeooo:rsid="002ced45" fo:background-color="transparent" loext:char-shading-value="0"/>
    </style:style>
    <style:style style:name="T22" style:family="text">
      <style:text-properties style:text-underline-style="none" officeooo:rsid="001b11d5"/>
    </style:style>
    <style:style style:name="T23" style:family="text">
      <style:text-properties style:text-underline-style="none" officeooo:rsid="001b11d5"/>
    </style:style>
    <style:style style:name="T24" style:family="text">
      <style:text-properties style:text-underline-style="none" officeooo:rsid="0016503c"/>
    </style:style>
    <style:style style:name="T25" style:family="text">
      <style:text-properties style:text-underline-style="none" officeooo:rsid="0016503c"/>
    </style:style>
    <style:style style:name="T26" style:family="text">
      <style:text-properties style:text-underline-style="none" officeooo:rsid="001a68a8"/>
    </style:style>
    <style:style style:name="T27" style:family="text">
      <style:text-properties style:text-underline-style="none" officeooo:rsid="00234460"/>
    </style:style>
    <style:style style:name="T28" style:family="text">
      <style:text-properties style:text-underline-style="none" officeooo:rsid="00127ad6"/>
    </style:style>
    <style:style style:name="T29" style:family="text">
      <style:text-properties style:text-underline-style="none" officeooo:rsid="00127ad6"/>
    </style:style>
    <style:style style:name="T30" style:family="text">
      <style:text-properties style:text-underline-style="none" officeooo:rsid="00266e87"/>
    </style:style>
    <style:style style:name="T31" style:family="text">
      <style:text-properties style:text-underline-style="none" officeooo:rsid="00266e87"/>
    </style:style>
    <style:style style:name="T32" style:family="text">
      <style:text-properties style:text-underline-style="none" officeooo:rsid="002ced45"/>
    </style:style>
    <style:style style:name="T33" style:family="text">
      <style:text-properties style:text-underline-style="none" officeooo:rsid="002ced45"/>
    </style:style>
    <style:style style:name="T34" style:family="text">
      <style:text-properties officeooo:rsid="001d039d"/>
    </style:style>
    <style:style style:name="T35" style:family="text">
      <style:text-properties fo:font-size="13pt" style:text-underline-style="none" fo:background-color="transparent" loext:char-shading-value="0" style:font-size-asian="13pt" style:font-size-complex="13pt"/>
    </style:style>
    <style:style style:name="T36" style:family="text">
      <style:text-properties fo:font-size="13pt" style:text-underline-style="none" fo:background-color="transparent" loext:char-shading-value="0" style:font-size-asian="13pt" style:font-size-complex="13pt"/>
    </style:style>
    <style:style style:name="T37" style:family="text">
      <style:text-properties fo:font-size="13pt" style:text-underline-style="none" style:font-size-asian="13pt" style:font-size-complex="13pt"/>
    </style:style>
    <style:style style:name="T38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UNTZIONATZEN DUTEN POLICY ak</text:p>
      <text:p text:style-name="P1"/>
      <text:p text:style-name="P33"><text:span text:style-name="T9">1. </text:span><text:span text:style-name="T16">open</text:span><text:span text:style-name="T9"> <text:s/></text:span></text:p>
      <text:p text:style-name="P33"><text:span text:style-name="T9"/></text:p>
      <text:p text:style-name="P15"><text:span text:style-name="T7">python3 eval_franka_2cam_contact_old.py <text:s text:c="2"/>/home/labiiwa/dit-policy/bc_finetune/</text:span><text:span text:style-name="T27">open</text:span><text:span text:style-name="T22">/</text:span><text:span text:style-name="T24">wandb_None_franka_2cam_contact_resnet_gn_2026-06-09_14-25-12</text:span><text:span text:style-name="T7">/</text:span><text:span text:style-name="T27">open</text:span><text:span text:style-name="T7">.ckpt <text:s text:c="2"/>--gamma 1.0 --T 500 --action_idx 3 --lift_scale </text:span><text:span text:style-name="T24">2</text:span><text:span text:style-name="T7">.0 </text:span></text:p>
      <text:p text:style-name="P1"/>
      <text:p text:style-name="P26"><text:span text:style-name="T4">2</text:span><text:span text:style-name="T5">. </text:span><text:span text:style-name="T4">banana</text:span><text:span text:style-name="T5"> </text:span><text:span text:style-name="T9"><text:s/></text:span></text:p>
      <text:p text:style-name="P26"><text:span text:style-name="T9"/></text:p>
      <text:p text:style-name="P15"><text:span text:style-name="T7">python3 eval_franka_2cam_contact_old.py <text:s text:c="2"/>/home/labiiwa/dit-policy/bc_finetune/dup_pausa_contact_img</text:span><text:span text:style-name="T22">1/</text:span><text:span text:style-name="T24">wandb_None_franka_2cam_contact_resnet_gn_2026-06-08_20-24-49</text:span><text:span text:style-name="T7">/dup_pausa_contact_img</text:span><text:span text:style-name="T26">1</text:span><text:span text:style-name="T7">.ckpt <text:s text:c="2"/>--gamma 1.0 --T 500 --action_idx 3 --lift_scale </text:span><text:span text:style-name="T24">2</text:span><text:span text:style-name="T7">.0 </text:span><text:span text:style-name="T37">--auto_lift --grasp_confirm_steps 5</text:span></text:p>
      <text:p text:style-name="P1"/>
      <text:p text:style-name="P34">3. coffee</text:p>
      <text:p text:style-name="P3"/>
      <text:p text:style-name="P9"><text:span text:style-name="T9">python3 eval_franka_2cam_contact_old.py <text:s text:c="2"/>/home/labiiwa/dit-policy/bc_finetune/</text:span><text:span text:style-name="T18">pick_coffee</text:span><text:span text:style-name="T14">/</text:span><text:span text:style-name="T11">wandb_None_franka_2cam_contact_resnet_gn_2026-06-10_10-53-01</text:span><text:span text:style-name="T9">/</text:span><text:span text:style-name="T18">pick_coffee</text:span><text:span text:style-name="T9">.ckpt <text:s text:c="2"/>--gamma 1.0 --T 500 --action_idx 3 --lift_scale </text:span><text:span text:style-name="T11">2</text:span><text:span text:style-name="T9">.0 </text:span><text:span text:style-name="T36">--auto_lift --grasp_confirm_steps 5</text:span></text:p>
      <text:p text:style-name="P1"/>
      <text:p text:style-name="P38">cd ~/dit-policy/eval_scripts</text:p>
      <text:p text:style-name="P38"/>
      <text:p text:style-name="P38">python3 eval_franka_2cam_contact_old_autolift_z_measured.py \</text:p>
      <text:p text:style-name="P11"><text:span text:style-name="T28">/home/labiiwa/dit-policy/bc_finetune/</text:span><text:span text:style-name="T30">pick_coffee</text:span><text:span text:style-name="T22">/</text:span><text:span text:style-name="T24">wandb_None_franka_2cam_contact_resnet_gn_2026-06-10_10-53-01</text:span><text:span text:style-name="T28">/</text:span><text:span text:style-name="T30">pick_coffee</text:span><text:span text:style-name="T28">.ckp</text:span><text:span text:style-name="T32">t</text:span><text:span text:style-name="T28"> </text:span>\</text:p>
      <text:p text:style-name="P38"><text:s text:c="2"/>--gamma 1.0 \</text:p>
      <text:p text:style-name="P38"><text:s text:c="2"/>--T 500 \</text:p>
      <text:p text:style-name="P38"><text:s text:c="2"/>--action_idx 3 \</text:p>
      <text:p text:style-name="P38"><text:s text:c="2"/>--auto_lift \</text:p>
      <text:p text:style-name="P38"><text:s text:c="2"/>--grasp_confirm_steps 3 \</text:p>
      <text:p text:style-name="P38"><text:s text:c="2"/>--lift_trigger 0.04 \</text:p>
      <text:p text:style-name="P38"><text:s text:c="2"/>--auto_lift_vertical_first \</text:p>
      <text:p text:style-name="P38"><text:s text:c="2"/>--auto_lift_z 0.10 \</text:p>
      <text:p text:style-name="P38"><text:s text:c="2"/>--auto_lift_hold_sec 0.15 \</text:p>
      <text:p text:style-name="P38"><text:s text:c="2"/>--auto_lift_hz 15 \</text:p>
      <text:p text:style-name="P38"><text:s text:c="2"/>--auto_lift_dq_max 0.035 \</text:p>
      <text:p text:style-name="P38"><text:s text:c="2"/>--auto_lift_step_pos_max 0.025 \</text:p>
      <text:p text:style-name="P38"><text:s text:c="2"/>--auto_lift_timeout 6.0 \</text:p>
      <text:p text:style-name="P38"><text:s text:c="2"/>--auto_lift_xy_hold_gain 0.10 \</text:p>
      <text:p text:style-name="P38"><text:s text:c="2"/>--home_dq_max 0.05 </text:p>
      <text:p text:style-name="P4"/>
      <text:p text:style-name="P1"/>
      <text:p text:style-name="P1"/>
      <text:p text:style-name="P1">FRAMEWORKa SORTZEN</text:p>
      <text:p text:style-name="P10"/>
      <text:p text:style-name="P10"><text:span text:style-name="T2">1. prueba_joints <text:s/>[finetune.py]:</text:span> <text:span text:style-name="T1">Convertidore zaharra</text:span></text:p>
      <text:p text:style-name="P10"/>
      <text:p text:style-name="P31">python3 eval_franka_2cam.py <text:s text:c="2"/>/home/labiiwa/dit-policy/bc_finetune/<text:span text:style-name="T6">prueba_joints</text:span>/wandb_None_franka_2cam_resnet_gn_2026-06-05_17-16-16/<text:span text:style-name="T6">prueba_joints</text:span>.ckpt <text:s/>--gamma 1.0 --T 500 --action_idx 3</text:p>
      <text:p text:style-name="P6"><text:soft-page-break/></text:p>
      <text:p text:style-name="P5"><text:span text:style-name="T3">2</text:span><text:span text:style-name="T2">. prueba_contact <text:s/>[finetune_contact.py]:</text:span> <text:span text:style-name="T1">Convertidore zaharrakin, hau da, normalizazio zaharra</text:span></text:p>
      <text:p text:style-name="P5"/>
      <text:p text:style-name="P7"><text:span text:style-name="T9">python3 eval_franka_2cam_contact_old.py <text:s text:c="2"/>/home/labiiwa/dit-policy/bc_finetune/</text:span><text:span text:style-name="T11">prueba_contact/</text:span><text:span text:style-name="T9">wandb_None_franka_2cam_contact_resnet_gn_2026-06-05_19-31-43/</text:span><text:span text:style-name="T11">prueba_contact</text:span><text:span text:style-name="T9">.ckpt <text:s text:c="2"/>--gamma 1.0 --T 500 --action_idx 3 --lift_scale </text:span><text:span text:style-name="T11">2</text:span><text:span text:style-name="T9">.0 <text:s text:c="2"/></text:span></text:p>
      <text:p text:style-name="P7"><text:span text:style-name="T9"/></text:p>
      <text:p text:style-name="P16"><text:span text:style-name="T7"/></text:p>
      <text:p text:style-name="P35"><text:span text:style-name="T7">EKAINAK 9</text:span></text:p>
      <text:p text:style-name="P32"><text:span text:style-name="T9"/></text:p>
      <text:p text:style-name="P24"><text:span text:style-name="T9">1. </text:span><text:span text:style-name="T16">open</text:span><text:span text:style-name="T9"> <text:s/>[finetune_contact.py]</text:span></text:p>
      <text:p text:style-name="P24"><text:span text:style-name="T9"/></text:p>
      <text:p text:style-name="P13"><text:span text:style-name="T7">python3 eval_franka_2cam_contact_old.py <text:s text:c="2"/>/home/labiiwa/dit-policy/bc_finetune/</text:span><text:span text:style-name="T27">open</text:span><text:span text:style-name="T22">/</text:span><text:span text:style-name="T24">wandb_None_franka_2cam_contact_resnet_gn_2026-06-09_14-25-12</text:span><text:span text:style-name="T7">/</text:span><text:span text:style-name="T27">open</text:span><text:span text:style-name="T7">.ckpt <text:s text:c="2"/>--gamma 1.0 --T 500 --action_idx 3 --lift_scale </text:span><text:span text:style-name="T24">2</text:span><text:span text:style-name="T7">.0 </text:span></text:p>
      <text:p text:style-name="P32"><text:span text:style-name="T9"/></text:p>
      <text:p text:style-name="P25"><text:span text:style-name="T9">1. </text:span><text:span text:style-name="T18">pick_coffee</text:span><text:span text:style-name="T9"> <text:s/>[finetune_contact.py]</text:span></text:p>
      <text:p text:style-name="P25"><text:span text:style-name="T9"/></text:p>
      <text:p text:style-name="P14"><text:span text:style-name="T8">python3 eval_franka_2cam_contact_old.py <text:s text:c="2"/>/home/labiiwa/dit-policy/bc_finetune/</text:span><text:span text:style-name="T17">pick_coffee</text:span><text:span text:style-name="T13">/</text:span><text:span text:style-name="T10">wandb_None_franka_2cam_contact_resnet_gn_2026-06-10_10-53-01</text:span><text:span text:style-name="T8">/</text:span><text:span text:style-name="T17">pick_coffee</text:span><text:span text:style-name="T8">.ckpt <text:s text:c="2"/>--gamma 1.0 --T 500 --action_idx 3 --lift_scale </text:span><text:span text:style-name="T10">2</text:span><text:span text:style-name="T8">.0 </text:span><text:span text:style-name="T35">--auto_lift --grasp_confirm_steps 5</text:span></text:p>
      <text:p text:style-name="P14"><text:span text:style-name="T35"/></text:p>
      <text:p text:style-name="P22"><text:span text:style-name="T9">1. dup_pausa_contact_img2 <text:s/>[finetune_contact.py]</text:span></text:p>
      <text:p text:style-name="P22"/>
      <text:p text:style-name="P36"><text:span text:style-name="T9">Funtzionatzen du baina inferentziak askoz gehixau tardatzen du</text:span></text:p>
      <text:p text:style-name="P36"><text:span text:style-name="T9"/></text:p>
      <text:p text:style-name="P20"><text:span text:style-name="T7">python3 eval_franka_2cam_contact_old.py <text:s text:c="2"/>/home/labiiwa/dit-policy/bc_finetune/dup_pausa_contact_img2/</text:span><text:span text:style-name="T24">wandb_None_franka_2cam_contact_resnet_gn_2026-06-08_17-50-40</text:span><text:span text:style-name="T7">/dup_pausa_contact_img2.ckpt <text:s text:c="2"/>--gamma 1.0 --T 500 --action_idx 3 --lift_scale </text:span><text:span text:style-name="T24">2</text:span><text:span text:style-name="T7">.0 <text:s text:c="2"/></text:span></text:p>
      <text:p text:style-name="P22"><text:span text:style-name="T9"/></text:p>
      <text:p text:style-name="P22"><text:span text:style-name="T9">2. dup_pausa_contact_img1 <text:s/>[finetune_contact.py]</text:span></text:p>
      <text:p text:style-name="P22"><text:span text:style-name="T9"/></text:p>
      <text:p text:style-name="P29"><text:span text:style-name="T38">Convertidorea</text:span></text:p>
      <text:p text:style-name="P19"><text:span text:style-name="T7">python3 convert_to_robobuf_contact_nosplit_ablation.py <text:s text:c="2"/>--dataset_dir ~/dit_demos/prueba <text:s text:c="2"/>--out_path ~/dit-policy/my_data/prueba_dup_pausa <text:s text:c="2"/>--hand_eye_yaml ~/dit-policy/my_data/hand_eye_result.yaml <text:s text:c="2"/>--trim_start_motion <text:s text:c="2"/>--motion_threshold 0.01 <text:s text:c="2"/>--keep_before_start 2 <text:s text:c="2"/>--dedup_static <text:s text:c="2"/>--q_eps 0.001 <text:s text:c="2"/>--g_eps 0.001</text:span></text:p>
      <text:p text:style-name="P22"><text:span text:style-name="T9"/></text:p>
      <text:p text:style-name="P12"><text:span text:style-name="T7">python3 eval_franka_2cam_contact_old.py <text:s text:c="2"/>/home/labiiwa/dit-policy/bc_finetune/dup_pausa_contact_img</text:span><text:span text:style-name="T22">1/</text:span><text:span text:style-name="T24">wandb_None_franka_2cam_contact_resnet_gn_2026-06-08_20-24-49</text:span><text:span text:style-name="T7">/dup_pausa_contact_img</text:span><text:span text:style-name="T26">1</text:span><text:span text:style-name="T7">.ckpt <text:s text:c="2"/>--gamma 1.0 --T 500 --action_idx 3 --lift_scale </text:span><text:span text:style-name="T24">2</text:span><text:span text:style-name="T7">.0 </text:span><text:span text:style-name="T37">--auto_lift --grasp_confirm_steps 5</text:span></text:p>
      <text:p text:style-name="P22"><text:span text:style-name="T9"/></text:p>
      <text:p text:style-name="P22"><text:span text:style-name="T9">3. res_dup_pausa_contact_img1 <text:s/>[finetune_contact.py]</text:span></text:p>
      <text:p text:style-name="P22"/>
      <text:p text:style-name="P8"><text:span text:style-name="T9">python3 eval_franka_2cam_contact_old.py <text:s text:c="2"/>/home/labiiwa/dit-policy/bc_finetune/</text:span><text:span text:style-name="T14">res_</text:span><text:span text:style-name="T9">dup_pausa_contact_img</text:span><text:span text:style-name="T14">1/</text:span><text:span text:style-name="T11">wandb_None_franka_2cam_contact_resnet_gn_2026-06-08_21-46-11</text:span><text:span text:style-name="T9">/</text:span><text:span text:style-name="T14">res_</text:span><text:span text:style-name="T9">dup_pausa_contact_img</text:span><text:span text:style-name="T12">1</text:span><text:span text:style-name="T9">.ckpt <text:s text:c="2"/>--gamma 1.0 --T 500 --action_idx 3 --lift_scale </text:span><text:span text:style-name="T11">2</text:span><text:span text:style-name="T9">.0 <text:s text:c="2"/></text:span></text:p>
      <text:p text:style-name="P22"><text:span text:style-name="T9"/></text:p>
      <text:p text:style-name="P22"><text:soft-page-break/><text:span text:style-name="T9">4. res_dup_pausa_contact_img2 <text:s/>[finetune_contact.py]</text:span></text:p>
      <text:p text:style-name="P22"><text:span text:style-name="T9"/></text:p>
      <text:p text:style-name="P8"><text:span text:style-name="T9">python3 eval_franka_2cam_contact_old.py <text:s text:c="2"/>/home/labiiwa/dit-policy/bc_finetune/</text:span><text:span text:style-name="T14">res_</text:span><text:span text:style-name="T9">dup_pausa_contact_img</text:span><text:span text:style-name="T14">2/</text:span><text:span text:style-name="T11">wandb_None_franka_2cam_contact_resnet_gn_2026-06-08_23-08-55</text:span><text:span text:style-name="T9">/</text:span><text:span text:style-name="T14">res_</text:span><text:span text:style-name="T9">dup_pausa_contact_img</text:span><text:span text:style-name="T14">2</text:span><text:span text:style-name="T9">.ckpt <text:s text:c="2"/>--gamma 1.0 --T 500 --action_idx 3 --lift_scale </text:span><text:span text:style-name="T11">2</text:span><text:span text:style-name="T9">.0 <text:s text:c="2"/></text:span></text:p>
      <text:p text:style-name="P23"><text:span text:style-name="T9"/></text:p>
      <text:p text:style-name="P22"><text:span text:style-name="T9"/></text:p>
      <text:p text:style-name="P22"><text:span text:style-name="T9">5. dup_pausa_contact_img3 <text:s/>[finetune_contact.py]</text:span></text:p>
      <text:p text:style-name="P22"><text:span text:style-name="T9"/></text:p>
      <text:p text:style-name="P8"><text:span text:style-name="T9">python3 eval_franka_2cam_contact_old.py <text:s text:c="2"/>/home/labiiwa/dit-policy/bc_finetune/dup_pausa_contact_img</text:span><text:span text:style-name="T14">3/</text:span><text:span text:style-name="T11">wandb_None_franka_2cam_contact_resnet_gn_2026-06-09_01-43-07</text:span><text:span text:style-name="T9">/dup_pausa_contact_img</text:span><text:span text:style-name="T14">3</text:span><text:span text:style-name="T9">.ckpt <text:s text:c="2"/>--gamma 1.0 --T 500 --action_idx 3 --lift_scale </text:span><text:span text:style-name="T11">2</text:span><text:span text:style-name="T9">.0 <text:s text:c="2"/></text:span></text:p>
      <text:p text:style-name="P23"><text:span text:style-name="T9"/></text:p>
      <text:p text:style-name="P27"><text:span text:style-name="T7">6. dup_pausa_dit_img1 <text:s/>[finetune.py]</text:span></text:p>
      <text:p text:style-name="P27"><text:span text:style-name="T7"/></text:p>
      <text:p text:style-name="P30">python3 eval_franka_2cam.py <text:s text:c="2"/>/home/labiiwa/dit-policy/bc_finetune/dup_pausa_dit_img1/wandb_None_franka_2cam_resnet_gn_2026-06-09_05-32-20/dup_pausa_dit_img1.ckpt <text:s/>--gamma 1.0 --T 500 --action_idx 3</text:p>
      <text:p text:style-name="P17"><text:span text:style-name="T7"/></text:p>
      <text:p text:style-name="P27"><text:span text:style-name="T7">7. dup_pausa_dit_img2 <text:s/>[finetune.py]</text:span></text:p>
      <text:p text:style-name="P27"><text:span text:style-name="T7"/></text:p>
      <text:p text:style-name="P30">python3 eval_franka_2cam.py <text:s text:c="2"/>/home/labiiwa/dit-policy/bc_finetune/dup_pausa_dit_img<text:span text:style-name="T34">2/wandb_None_franka_2cam_resnet_gn_2026-06-09_06-56-02</text:span>/dup_pausa_dit_img<text:span text:style-name="T34">2</text:span>.ckpt <text:s/>--gamma 1.0 --T 500 --action_idx 3</text:p>
      <text:p text:style-name="P17"><text:span text:style-name="T7"/></text:p>
      <text:p text:style-name="P17"/>
      <text:p text:style-name="P28">DEBUG PLACE</text:p>
      <text:p text:style-name="P21"/>
      <text:p text:style-name="P18">cd ~/dit-policy</text:p>
      <text:p text:style-name="P18"/>
      <text:p text:style-name="P18">python3 /mnt/data/debug_place_anchor_depth_rgb.py \</text:p>
      <text:p text:style-name="P18"><text:s text:c="2"/>--dataset_dir ~/dit_demos/place_drawer \</text:p>
      <text:p text:style-name="P18"><text:s text:c="2"/>--hand_eye_yaml ~/dit-policy/my_data/hand_eye_result.yaml \</text:p>
      <text:p text:style-name="P18"><text:s text:c="2"/>--out_dir ~/dit-policy/my_data/place_drawer_depth_debug_rgb \</text:p>
      <text:p text:style-name="P18"><text:s text:c="2"/>--ref_frame 0 \</text:p>
      <text:p text:style-name="P18"><text:s text:c="2"/>--open_threshold 0.07 \</text:p>
      <text:p text:style-name="P18"><text:s text:c="2"/>--u 160 \</text:p>
      <text:p text:style-name="P18"><text:s text:c="2"/>--v 110 \</text:p>
      <text:p text:style-name="P18"><text:s text:c="2"/>--ref_radius 15 \</text:p>
      <text:p text:style-name="P18"><text:s text:c="2"/>--seed_radius 15 \</text:p>
      <text:p text:style-name="P18"><text:s text:c="2"/>--crop_half 100</text:p>
      <text:p text:style-name="P18"/>
      <text:p text:style-name="P18">firefox ~/dit-policy/my_data/place_drawer_depth_debug_rgb/index.htm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Lohit Devanagari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Lohit Devanagari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8T09:02:18.419741443</meta:creation-date>
    <dc:date>2026-06-10T15:36:43.051357476</dc:date>
    <meta:editing-duration>P1DT21H30M35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3" meta:paragraph-count="66" meta:word-count="424" meta:character-count="5331" meta:non-whitespace-character-count="4914"/>
  </office:meta>
</office:document-meta>
</file>